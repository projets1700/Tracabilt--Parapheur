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>
      <style:text-properties fo:font-weight="bold" style:font-weight-asian="bold" style:font-weight-complex="bold"/>
    </style:style>
    <style:style style:name="P9" style:parent-style-name="Normal" style:list-style-name="LFO1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Paragraphedeliste" style:list-style-name="LFO2" style:family="paragraph">
      <style:text-properties fo:font-weight="bold" style:font-weight-asian="bold" style:font-weight-complex="bold"/>
    </style:style>
    <style:style style:name="P13" style:parent-style-name="Paragraphedeliste" style:list-style-name="LFO2" style:family="paragraph">
      <style:text-properties fo:font-weight="bold" style:font-weight-asian="bold" style:font-weight-complex="bold"/>
    </style:style>
    <style:style style:name="P14" style:parent-style-name="Paragraphedeliste" style:list-style-name="LFO2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Paragraphedeliste" style:list-style-name="LFO3" style:family="paragraph">
      <style:text-properties fo:font-weight="bold" style:font-weight-asian="bold" style:font-weight-complex="bold"/>
    </style:style>
    <style:style style:name="P17" style:parent-style-name="Paragraphedeliste" style:list-style-name="LFO3" style:family="paragraph">
      <style:text-properties fo:font-weight="bold" style:font-weight-asian="bold" style:font-weight-complex="bold"/>
    </style:style>
    <style:style style:name="P18" style:parent-style-name="Paragraphedeliste" style:list-style-name="LFO3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Paragraphedeliste" style:list-style-name="LFO4" style:family="paragraph">
      <style:text-properties fo:font-weight="bold" style:font-weight-asian="bold" style:font-weight-complex="bold"/>
    </style:style>
    <style:style style:name="P22" style:parent-style-name="Paragraphedeliste" style:list-style-name="LFO4" style:family="paragraph">
      <style:text-properties fo:font-weight="bold" style:font-weight-asian="bold" style:font-weight-complex="bold"/>
    </style:style>
    <style:style style:name="P23" style:parent-style-name="Paragraphedeliste" style:list-style-name="LFO4" style:family="paragraph">
      <style:text-properties fo:font-weight="bold" style:font-weight-asian="bold" style:font-weight-complex="bold"/>
    </style:style>
    <style:style style:name="P24" style:parent-style-name="Paragraphedeliste" style:list-style-name="LFO4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Paragraphedeliste" style:list-style-name="LFO5" style:family="paragraph">
      <style:text-properties fo:font-weight="bold" style:font-weight-asian="bold" style:font-weight-complex="bold"/>
    </style:style>
    <style:style style:name="P27" style:parent-style-name="Paragraphedeliste" style:list-style-name="LFO5" style:family="paragraph">
      <style:text-properties fo:font-weight="bold" style:font-weight-asian="bold" style:font-weight-complex="bold"/>
    </style:style>
    <style:style style:name="P28" style:parent-style-name="Paragraphedeliste" style:list-style-name="LFO5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Paragraphedeliste" style:list-style-name="LFO6" style:family="paragraph">
      <style:text-properties fo:font-weight="bold" style:font-weight-asian="bold" style:font-weight-complex="bold"/>
    </style:style>
    <style:style style:name="P34" style:parent-style-name="Paragraphedeliste" style:list-style-name="LFO6" style:family="paragraph">
      <style:text-properties fo:font-weight="bold" style:font-weight-asian="bold" style:font-weight-complex="bold"/>
    </style:style>
    <style:style style:name="P35" style:parent-style-name="Paragraphedeliste" style:list-style-name="LFO6" style:family="paragraph">
      <style:text-properties fo:font-weight="bold" style:font-weight-asian="bold" style:font-weight-complex="bold"/>
    </style:style>
    <style:style style:name="P36" style:parent-style-name="Paragraphedeliste" style:list-style-name="LFO6" style:family="paragraph">
      <style:text-properties fo:font-weight="bold" style:font-weight-asian="bold" style:font-weight-complex="bold"/>
    </style:style>
    <style:style style:name="P37" style:parent-style-name="Paragraphedeliste" style:list-style-name="LFO6" style:family="paragraph">
      <style:text-properties fo:font-weight="bold" style:font-weight-asian="bold" style:font-weight-complex="bold"/>
    </style:style>
    <style:style style:name="P38" style:parent-style-name="Paragraphedeliste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7" style:family="paragraph">
      <style:text-properties fo:font-weight="bold" style:font-weight-asian="bold" style:font-weight-complex="bold"/>
    </style:style>
    <style:style style:name="P41" style:parent-style-name="Normal" style:list-style-name="LFO7" style:family="paragraph">
      <style:text-properties fo:font-weight="bold" style:font-weight-asian="bold" style:font-weight-complex="bold"/>
    </style:style>
    <style:style style:name="P42" style:parent-style-name="Normal" style:list-style-name="LFO7" style:family="paragraph">
      <style:text-properties fo:font-weight="bold" style:font-weight-asian="bold" style:font-weight-complex="bold"/>
    </style:style>
    <style:style style:name="P43" style:parent-style-name="Normal" style:list-style-name="LFO7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8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Paragraphedeliste" style:list-style-name="LFO9" style:family="paragraph">
      <style:text-properties fo:font-weight="bold" style:font-weight-asian="bold" style:font-weight-complex="bold"/>
    </style:style>
    <style:style style:name="P50" style:parent-style-name="Paragraphedeliste" style:list-style-name="LFO9" style:family="paragraph">
      <style:text-properties fo:font-weight="bold" style:font-weight-asian="bold" style:font-weight-complex="bold"/>
    </style:style>
    <style:style style:name="P51" style:parent-style-name="Paragraphedeliste" style:list-style-name="LFO9" style:family="paragraph">
      <style:text-properties fo:font-weight="bold" style:font-weight-asian="bold" style:font-weight-complex="bold"/>
    </style:style>
    <style:style style:name="P52" style:parent-style-name="Paragraphedeliste" style:list-style-name="LFO9" style:family="paragraph">
      <style:text-properties fo:font-weight="bold" style:font-weight-asian="bold" style:font-weight-complex="bold"/>
    </style:style>
    <style:style style:name="P53" style:parent-style-name="Paragraphedeliste" style:list-style-name="LFO9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Paragraphedeliste" style:list-style-name="LFO10" style:family="paragraph">
      <style:text-properties fo:font-weight="bold" style:font-weight-asian="bold" style:font-weight-complex="bold"/>
    </style:style>
    <style:style style:name="P57" style:parent-style-name="Paragraphedeliste" style:list-style-name="LFO10" style:family="paragraph">
      <style:text-properties fo:font-weight="bold" style:font-weight-asian="bold" style:font-weight-complex="bold"/>
    </style:style>
    <style:style style:name="P58" style:parent-style-name="Paragraphedeliste" style:list-style-name="LFO10" style:family="paragraph">
      <style:text-properties fo:font-weight="bold" style:font-weight-asian="bold" style:font-weight-complex="bold"/>
    </style:style>
    <style:style style:name="P59" style:parent-style-name="Paragraphedeliste" style:list-style-name="LFO10" style:family="paragraph">
      <style:text-properties fo:font-weight="bold" style:font-weight-asian="bold" style:font-weight-complex="bold"/>
    </style:style>
    <style:style style:name="P60" style:parent-style-name="Paragraphedeliste" style:list-style-name="LFO10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11" style:family="paragraph">
      <style:text-properties fo:font-weight="bold" style:font-weight-asian="bold" style:font-weight-complex="bold"/>
    </style:style>
    <style:style style:name="P65" style:parent-style-name="Normal" style:list-style-name="LFO11" style:family="paragraph">
      <style:text-properties fo:font-weight="bold" style:font-weight-asian="bold" style:font-weight-complex="bold"/>
    </style:style>
    <style:style style:name="P66" style:parent-style-name="Normal" style:list-style-name="LFO11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12" style:family="paragraph">
      <style:text-properties fo:font-weight="bold" style:font-weight-asian="bold" style:font-weight-complex="bold"/>
    </style:style>
    <style:style style:name="P70" style:parent-style-name="Normal" style:list-style-name="LFO12" style:family="paragraph">
      <style:text-properties fo:font-weight="bold" style:font-weight-asian="bold" style:font-weight-complex="bold"/>
    </style:style>
    <style:style style:name="P71" style:parent-style-name="Normal" style:list-style-name="LFO12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13" style:family="paragraph">
      <style:text-properties fo:font-weight="bold" style:font-weight-asian="bold" style:font-weight-complex="bold"/>
    </style:style>
    <style:style style:name="P76" style:parent-style-name="Normal" style:list-style-name="LFO13" style:family="paragraph">
      <style:text-properties fo:font-weight="bold" style:font-weight-asian="bold" style:font-weight-complex="bold"/>
    </style:style>
    <style:style style:name="P77" style:parent-style-name="Normal" style:list-style-name="LFO13" style:family="paragraph">
      <style:text-properties fo:font-weight="bold" style:font-weight-asian="bold" style:font-weight-complex="bold"/>
    </style:style>
    <style:style style:name="P78" style:parent-style-name="Normal" style:list-style-name="LFO13" style:family="paragraph">
      <style:text-properties fo:font-weight="bold" style:font-weight-asian="bold" style:font-weight-complex="bold"/>
    </style:style>
    <style:style style:name="P79" style:parent-style-name="Normal" style:list-style-name="LFO13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14" style:family="paragraph">
      <style:text-properties fo:font-weight="bold" style:font-weight-asian="bold" style:font-weight-complex="bold"/>
    </style:style>
    <style:style style:name="P84" style:parent-style-name="Normal" style:list-style-name="LFO14" style:family="paragraph">
      <style:text-properties fo:font-weight="bold" style:font-weight-asian="bold" style:font-weight-complex="bold"/>
    </style:style>
    <style:style style:name="P85" style:parent-style-name="Normal" style:list-style-name="LFO14" style:family="paragraph">
      <style:text-properties fo:font-weight="bold" style:font-weight-asian="bold" style:font-weight-complex="bold"/>
    </style:style>
    <style:style style:name="P86" style:parent-style-name="Normal" style:list-style-name="LFO14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15" style:family="paragraph">
      <style:text-properties fo:font-weight="bold" style:font-weight-asian="bold" style:font-weight-complex="bold"/>
    </style:style>
    <style:style style:name="P94" style:parent-style-name="Normal" style:list-style-name="LFO15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16" style:family="paragraph">
      <style:text-properties fo:font-weight="bold" style:font-weight-asian="bold" style:font-weight-complex="bold"/>
    </style:style>
    <style:style style:name="P98" style:parent-style-name="Normal" style:list-style-name="LFO16" style:family="paragraph">
      <style:text-properties fo:font-weight="bold" style:font-weight-asian="bold" style:font-weight-complex="bold"/>
    </style:style>
    <style:style style:name="P99" style:parent-style-name="Normal" style:list-style-name="LFO16" style:family="paragraph">
      <style:text-properties fo:font-weight="bold" style:font-weight-asian="bold" style:font-weight-complex="bold"/>
    </style:style>
    <style:style style:name="P100" style:parent-style-name="Normal" style:list-style-name="LFO16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17" style:family="paragraph">
      <style:text-properties fo:font-weight="bold" style:font-weight-asian="bold" style:font-weight-complex="bold"/>
    </style:style>
    <style:style style:name="P104" style:parent-style-name="Normal" style:list-style-name="LFO17" style:family="paragraph">
      <style:text-properties fo:font-weight="bold" style:font-weight-asian="bold" style:font-weight-complex="bold"/>
    </style:style>
    <style:style style:name="P105" style:parent-style-name="Normal" style:list-style-name="LFO17" style:family="paragraph">
      <style:text-properties fo:font-weight="bold" style:font-weight-asian="bold" style:font-weight-complex="bold"/>
    </style:style>
    <style:style style:name="P106" style:parent-style-name="Normal" style:list-style-name="LFO17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18" style:family="paragraph">
      <style:text-properties fo:font-weight="bold" style:font-weight-asian="bold" style:font-weight-complex="bold"/>
    </style:style>
    <style:style style:name="P110" style:parent-style-name="Normal" style:list-style-name="LFO18" style:family="paragraph">
      <style:text-properties fo:font-weight="bold" style:font-weight-asian="bold" style:font-weight-complex="bold"/>
    </style:style>
    <style:style style:name="P111" style:parent-style-name="Normal" style:list-style-name="LFO18" style:family="paragraph">
      <style:text-properties fo:font-weight="bold" style:font-weight-asian="bold" style:font-weight-complex="bold"/>
    </style:style>
    <style:style style:name="P112" style:parent-style-name="Normal" style:list-style-name="LFO18" style:family="paragraph">
      <style:text-properties fo:font-weight="bold" style:font-weight-asian="bold" style:font-weight-complex="bold"/>
    </style:style>
    <style:style style:name="P113" style:parent-style-name="Normal" style:list-style-name="LFO18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121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hier des charges — Système de traçabilité parapheurs QR code + géolocalisation</text:p>
      <text:p text:style-name="P2"/>
      <text:p text:style-name="P3">1. Objet du projet</text:p>
      <text:p text:style-name="P4">Développer une application de traçabilité permettant de suivre des parapheurs via QR code et position GPS, avec gestion multi-profils utilisateurs.</text:p>
      <text:p text:style-name="P5">2. Objectifs</text:p>
      <text:list text:style-name="LFO1" text:continue-numbering="true">
        <text:list-item>
          <text:p text:style-name="P6">Associer chaque parapheur à une identité unique (QR code)<text:s/></text:p>
        </text:list-item>
        <text:list-item>
          <text:p text:style-name="P7">Enregistrer la position GPS lors des scans<text:s/></text:p>
        </text:list-item>
        <text:list-item>
          <text:p text:style-name="P8">Fournir un suivi en quasi-temps réel des déplacements (selon mode actif)<text:s/></text:p>
        </text:list-item>
        <text:list-item>
          <text:p text:style-name="P9">Gérer plusieurs types d’utilisateurs avec des droits distincts<text:s/></text:p>
        </text:list-item>
      </text:list>
      <text:p text:style-name="P10">3. Profils utilisateurs</text:p>
      <text:p text:style-name="P11">3.1 Visionneur (pas de compte) peut :</text:p>
      <text:list text:style-name="LFO2" text:continue-numbering="true">
        <text:list-item>
          <text:p text:style-name="P12">consulter ses parapheurs ;</text:p>
        </text:list-item>
        <text:list-item>
          <text:p text:style-name="P13">visualiser le dernier emplacement connu ;</text:p>
        </text:list-item>
        <text:list-item>
          <text:p text:style-name="P14">consulter l’historique des déplacements ;</text:p>
        </text:list-item>
      </text:list>
      <text:p text:style-name="P15">ne peut pas :</text:p>
      <text:list text:style-name="LFO3" text:continue-numbering="true">
        <text:list-item>
          <text:p text:style-name="P16">modifier les données ;</text:p>
        </text:list-item>
        <text:list-item>
          <text:p text:style-name="P17">gérer les utilisateurs ;</text:p>
        </text:list-item>
        <text:list-item>
          <text:p text:style-name="P18">accéder aux parapheurs des autres utilisateurs.</text:p>
        </text:list-item>
      </text:list>
      <text:p text:style-name="P19">3.2 Opérateur (Scanneur)</text:p>
      <text:p text:style-name="P20">Il peut :</text:p>
      <text:list text:style-name="LFO4" text:continue-numbering="true">
        <text:list-item>
          <text:p text:style-name="P21">scanner les parapheurs via QR code ;</text:p>
        </text:list-item>
        <text:list-item>
          <text:p text:style-name="P22">transmettre automatiquement les données GPS ;</text:p>
        </text:list-item>
        <text:list-item>
          <text:p text:style-name="P23">enregistrer les événements de scan ;</text:p>
        </text:list-item>
        <text:list-item>
          <text:p text:style-name="P24">synchroniser les données lorsque le réseau est disponible.</text:p>
        </text:list-item>
      </text:list>
      <text:p text:style-name="P25">Il ne peut pas :</text:p>
      <text:list text:style-name="LFO5" text:continue-numbering="true">
        <text:list-item>
          <text:p text:style-name="P26">gérer les utilisateurs ;</text:p>
        </text:list-item>
        <text:list-item>
          <text:p text:style-name="P27">accéder aux paramètres système ;</text:p>
        </text:list-item>
        <text:list-item>
          <text:p text:style-name="P28">modifier les données administratives.</text:p>
        </text:list-item>
      </text:list>
      <text:p text:style-name="P29"/>
      <text:p text:style-name="P30"/>
      <text:soft-page-break/>
      <text:p text:style-name="P31">3.3 Administrateur</text:p>
      <text:p text:style-name="P32">L’administrateur peut :</text:p>
      <text:list text:style-name="LFO6" text:continue-numbering="true">
        <text:list-item>
          <text:p text:style-name="P33">gérer les parapheurs ;</text:p>
        </text:list-item>
        <text:list-item>
          <text:p text:style-name="P34">consulter l’ensemble des événements ;</text:p>
        </text:list-item>
        <text:list-item>
          <text:p text:style-name="P35">accéder aux historiques complets ;</text:p>
        </text:list-item>
        <text:list-item>
          <text:p text:style-name="P36">superviser l’activité globale du système ;</text:p>
        </text:list-item>
        <text:list-item>
          <text:p text:style-name="P37">consulter les positions GPS de tous les parapheurs.</text:p>
        </text:list-item>
      </text:list>
      <text:p text:style-name="P38"/>
      <text:p text:style-name="P39">4. Fonctionnement global</text:p>
      <text:list text:style-name="LFO7" text:continue-numbering="true">
        <text:list-item>
          <text:p text:style-name="P40">Chaque parapheur est identifié par un QR code unique<text:s/></text:p>
        </text:list-item>
        <text:list-item>
          <text:p text:style-name="P41">Chaque scan génère un événement géolocalisé<text:s/></text:p>
        </text:list-item>
        <text:list-item>
          <text:p text:style-name="P42">Les positions sont stockées et associées au parapheur<text:s/></text:p>
        </text:list-item>
        <text:list-item>
          <text:p text:style-name="P43">Les données sont accessibles via le numéro du parapheur</text:p>
        </text:list-item>
      </text:list>
      <text:p text:style-name="P44">5. Application mobile (Opérateur)</text:p>
      <text:p text:style-name="P45">Fonction principale</text:p>
      <text:list text:style-name="LFO8" text:continue-numbering="true">
        <text:list-item>
          <text:p text:style-name="P46">Scan QR code parapheur<text:s/></text:p>
        </text:list-item>
      </text:list>
      <text:p text:style-name="P47">Fonctionnement lors d’un scan</text:p>
      <text:p text:style-name="P48">Le système doit automatiquement :</text:p>
      <text:list text:style-name="LFO9" text:continue-numbering="true">
        <text:list-item>
          <text:p text:style-name="P49">identifier le parapheur via le QR code ;</text:p>
        </text:list-item>
        <text:list-item>
          <text:p text:style-name="P50">récupérer la latitude et la longitude ;</text:p>
        </text:list-item>
        <text:list-item>
          <text:p text:style-name="P51">enregistrer la date et l’heure ;</text:p>
        </text:list-item>
        <text:list-item>
          <text:p text:style-name="P52">enregistrer les données localement ;</text:p>
        </text:list-item>
        <text:list-item>
          <text:p text:style-name="P53">synchroniser les données vers le backend lorsque le réseau est disponible</text:p>
        </text:list-item>
      </text:list>
      <text:p text:style-name="P54">Contraintes de fonctionnement</text:p>
      <text:p text:style-name="P55">L’application doit :</text:p>
      <text:list text:style-name="LFO10" text:continue-numbering="true">
        <text:list-item>
          <text:p text:style-name="P56">fonctionner sur terminal Android ;</text:p>
        </text:list-item>
        <text:list-item>
          <text:p text:style-name="P57">être utilisable en mobilité ;</text:p>
        </text:list-item>
        <text:list-item>
          <text:p text:style-name="P58">rester fluide et rapide ;</text:p>
        </text:list-item>
        <text:list-item>
          <text:p text:style-name="P59">fonctionner même en cas de perte de réseau ;</text:p>
        </text:list-item>
        <text:list-item>
          <text:p text:style-name="P60">limiter la consommation batterie.</text:p>
        </text:list-item>
      </text:list>
      <text:p text:style-name="P61"/>
      <text:p text:style-name="P62"/>
      <text:soft-page-break/>
      <text:p text:style-name="P63">6. Interface utilisateur (sans compte)</text:p>
      <text:list text:style-name="LFO11" text:continue-numbering="true">
        <text:list-item>
          <text:p text:style-name="P64">Taper le nom du parapheur</text:p>
        </text:list-item>
        <text:list-item>
          <text:p text:style-name="P65">Position<text:s/></text:p>
        </text:list-item>
        <text:list-item>
          <text:p text:style-name="P66">Consultation de l’historique des déplacements du parapheur</text:p>
        </text:list-item>
      </text:list>
      <text:p text:style-name="P67"/>
      <text:p text:style-name="P68">7. Interface administrateur<text:s/></text:p>
      <text:list text:style-name="LFO12" text:continue-numbering="true">
        <text:list-item>
          <text:p text:style-name="P69">Accès à tous les parapheurs</text:p>
        </text:list-item>
        <text:list-item>
          <text:p text:style-name="P70">Accès à toutes les positions GPS<text:s/></text:p>
        </text:list-item>
        <text:list-item>
          <text:p text:style-name="P71">Supervision des activités du système<text:s/></text:p>
        </text:list-item>
      </text:list>
      <text:p text:style-name="P72"/>
      <text:p text:style-name="P73">8. Système de données</text:p>
      <text:p text:style-name="P74">Chaque événement enregistré contient :</text:p>
      <text:list text:style-name="LFO13" text:continue-numbering="true">
        <text:list-item>
          <text:p text:style-name="P75">Identifiant du parapheur</text:p>
        </text:list-item>
        <text:list-item>
          <text:p text:style-name="P76">Position GPS (latitude / longitude)<text:s/></text:p>
        </text:list-item>
        <text:list-item>
          <text:p text:style-name="P77">Date et heure<text:s/></text:p>
        </text:list-item>
        <text:list-item>
          <text:p text:style-name="P78">Identifiant de l’appareil<text:s/></text:p>
        </text:list-item>
        <text:list-item>
          <text:p text:style-name="P79">Type d’événement (départ , livré)<text:s/></text:p>
        </text:list-item>
      </text:list>
      <text:p text:style-name="P80"/>
      <text:p text:style-name="P81">9. Backend</text:p>
      <text:p text:style-name="P82">Le backend doit assurer :</text:p>
      <text:list text:style-name="LFO14" text:continue-numbering="true">
        <text:list-item>
          <text:p text:style-name="P83">Réception des événements de scan<text:s/></text:p>
        </text:list-item>
        <text:list-item>
          <text:p text:style-name="P84">Gestion des droits selon les profils<text:s/></text:p>
        </text:list-item>
        <text:list-item>
          <text:p text:style-name="P85">Stockage sécurisé des données<text:s/></text:p>
        </text:list-item>
        <text:list-item>
          <text:p text:style-name="P86">Restitution des historiques et positions<text:s/></text:p>
        </text:list-item>
      </text:list>
      <text:p text:style-name="P87"/>
      <text:p text:style-name="P88"/>
      <text:p text:style-name="P89"/>
      <text:p text:style-name="P90"/>
      <text:soft-page-break/>
      <text:p text:style-name="P91">10. Interface web</text:p>
      <text:p text:style-name="P92">Fonctionnalités principales</text:p>
      <text:list text:style-name="LFO15" text:continue-numbering="true">
        <text:list-item>
          <text:p text:style-name="P93">Visualisation des trajets<text:s/></text:p>
        </text:list-item>
        <text:list-item>
          <text:p text:style-name="P94">Consultation des événements<text:s/></text:p>
        </text:list-item>
      </text:list>
      <text:p text:style-name="P95"/>
      <text:p text:style-name="P96">11. Contraintes techniques</text:p>
      <text:list text:style-name="LFO16" text:continue-numbering="true">
        <text:list-item>
          <text:p text:style-name="P97">GPS activé uniquement lors des scans : la position GPS est enregistrée lors des scans. Le GPS est activé sur l’appareil lorsque l’appli est utilisée</text:p>
        </text:list-item>
        <text:list-item>
          <text:p text:style-name="P98">Fonctionnement possible en conditions réseau instables<text:s/></text:p>
        </text:list-item>
        <text:list-item>
          <text:p text:style-name="P99">Synchronisation des données en cas de perte de connexion<text:s/></text:p>
        </text:list-item>
        <text:list-item>
          <text:p text:style-name="P100">Optimisation de la batterie sur mobile<text:s/></text:p>
        </text:list-item>
      </text:list>
      <text:p text:style-name="P101"/>
      <text:p text:style-name="P102">12. Sécurité</text:p>
      <text:list text:style-name="LFO17" text:continue-numbering="true">
        <text:list-item>
          <text:p text:style-name="P103">Authentification obligatoire pour Scanneur + Admin (visionneur sans compte)</text:p>
        </text:list-item>
        <text:list-item>
          <text:p text:style-name="P104">Gestion des rôles et permissions<text:s/></text:p>
        </text:list-item>
        <text:list-item>
          <text:p text:style-name="P105">Protection des données de localisation<text:s/></text:p>
        </text:list-item>
        <text:list-item>
          <text:p text:style-name="P106">Contrôle des accès par profil utilisateur<text:s/></text:p>
        </text:list-item>
      </text:list>
      <text:p text:style-name="P107"/>
      <text:p text:style-name="P108">13. MVP (version initiale)</text:p>
      <text:list text:style-name="LFO18" text:continue-numbering="true">
        <text:list-item>
          <text:p text:style-name="P109">Scan QR code<text:s/></text:p>
        </text:list-item>
        <text:list-item>
          <text:p text:style-name="P110">Capture GPS<text:s/></text:p>
        </text:list-item>
        <text:list-item>
          <text:p text:style-name="P111">Enregistrement des événements<text:s/></text:p>
        </text:list-item>
        <text:list-item>
          <text:p text:style-name="P112">Interface client de consultation<text:s/></text:p>
        </text:list-item>
        <text:list-item>
          <text:p text:style-name="P113">Gestion basique des rôles<text:s/></text:p>
        </text:list-item>
      </text:list>
      <text:p text:style-name="P114"/>
      <text:p text:style-name="P115">14. Évolutions possibles</text:p>
      <text:p text:style-name="P116">Utilisateur avec compte rôle : (accès à tous ses parapheurs)</text:p>
      <text:p text:style-name="P117">Sup-admin rôle : (gérer les utilisateurs) ;</text:p>
      <text:soft-page-break/>
      <text:p text:style-name="P118">Autres fonctionnalités prévues :</text:p>
      <text:p text:style-name="P119">Carte avec historique des parapheurs<text:s/></text:p>
      <text:p text:style-name="P120">Plusieurs scanner<text:s/></text:p>
      <text:p text:style-name="Normal"><text:span text:style-name="T121">Compte utilisateur connec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am AMRANE</meta:initial-creator>
    <dc:creator>Adam AMRANE</dc:creator>
    <meta:creation-date>2026-05-21T12:20:00Z</meta:creation-date>
    <dc:date>2026-05-26T12:10:00Z</dc:date>
    <meta:template xlink:href="Normal" xlink:type="simple"/>
    <meta:editing-cycles>17</meta:editing-cycles>
    <meta:editing-duration>PT0S</meta:editing-duration>
    <meta:document-statistic meta:page-count="5" meta:paragraph-count="7" meta:word-count="594" meta:character-count="3857" meta:row-count="27" meta:non-whitespace-character-count="3270"/>
  </office:meta>
</office:document-meta>
</file>